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07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7.1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llPassFilter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1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 25V N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2,C4,C33,C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pF C0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5,C8,C11,C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 25V Aud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6,C9,C12,C15,C18,C21,C24,C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 P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7,C10,C13,C16,C19,C22,C25,C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pF C0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17,C20,C23,C26,C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 X7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30,C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 25V G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 25V Aud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0,J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_P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_P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0_P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_P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P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1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2,R3,R4,R5,R7,R8,R9,R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k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11,R15,R19,R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12,R13,R14,R16,R17,R18,R20,R21, R22,R24,R25,R26,R27,R28,R29,R30, R31,R32,R33,R34,R35,R36,R37,R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k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V1,RV2,RV3,RV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d C100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otary_1x8_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1,U2,U3,U4,U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5532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8T17:45:31.121809088</dc:date>
    <dc:creator>Andrew Martin</dc:creator>
    <meta:editing-duration>PT6M12S</meta:editing-duration>
    <meta:editing-cycles>2</meta:editing-cycles>
    <meta:generator>LibreOffice/7.5.9.2$Linux_X86_64 LibreOffice_project/50$Build-2</meta:generator>
    <meta:document-statistic meta:table-count="1" meta:cell-count="72" meta:object-count="0"/>
  </office:meta>
</office:document-meta>
</file>